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700000175BD5FF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rsid="000692e6" officeooo:paragraph-rsid="000692e6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>
      <style:text-properties officeooo:paragraph-rsid="0007d94e"/>
    </style:style>
    <style:style style:name="T1" style:family="text">
      <style:text-properties fo:language="ru" fo:country="RU" fo:font-weight="bold" officeooo:rsid="0007d94e" style:font-weight-asian="bold" style:font-weight-complex="bold"/>
    </style:style>
    <style:style style:name="T2" style:family="text">
      <style:text-properties fo:language="en" fo:country="US" fo:font-weight="bold" officeooo:rsid="0007d94e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Сверстать полноценный frontend-макет SaaS интерфейса “Реактивация клиентов для Bitrix24” по предоставленным экранам (Dashboard, Рекомендации, Клиенты в зоне риска, Купоны, Настройки).</text:p>
      <text:p text:style-name="Text_20_body">Требования:</text:p>
      <text:list text:style-name="L1">
        <text:list-item>
          <text:p text:style-name="P1">HTML + CSS + JS</text:p>
        </text:list-item>
        <text:list-item>
          <text:p text:style-name="P1">JS предпочтительно на jQuery</text:p>
        </text:list-item>
        <text:list-item>
          <text:p text:style-name="P1">Вёрстка должна быть максимально готовой к интеграции с backend</text:p>
        </text:list-item>
        <text:list-item>
          <text:p text:style-name="P1">Все элементы интерфейса должны быть интерактивными:</text:p>
          <text:list>
            <text:list-item>
              <text:p text:style-name="P1">hover состояния</text:p>
            </text:list-item>
            <text:list-item>
              <text:p text:style-name="P1">dropdown/select</text:p>
            </text:list-item>
            <text:list-item>
              <text:p text:style-name="P1">кнопки</text:p>
            </text:list-item>
            <text:list-item>
              <text:p text:style-name="P1">переключатели</text:p>
            </text:list-item>
            <text:list-item>
              <text:p text:style-name="P1">пагинация</text:p>
            </text:list-item>
            <text:list-item>
              <text:p text:style-name="P1">tooltip</text:p>
            </text:list-item>
            <text:list-item>
              <text:p text:style-name="P1">модальные/раскрывающиеся элементы (если предусмотрены)</text:p>
            </text:list-item>
          </text:list>
        </text:list-item>
        <text:list-item>
          <text:p text:style-name="P1">Все данные статические (mock data внутри JS)</text:p>
        </text:list-item>
      </text:list>
      <text:p text:style-name="Text_20_body">Графики и диаграммы:<text:line-break/>Использовать популярную библиотеку:</text:p>
      <text:list text:style-name="L2">
        <text:list-item>
          <text:p text:style-name="P2">ApexCharts <text:line-break/>или</text:p>
        </text:list-item>
        <text:list-item>
          <text:p text:style-name="P2">Chart.js<text:line-break/>или</text:p>
        </text:list-item>
        <text:list-item>
          <text:p text:style-name="P2">Echarts</text:p>
          <text:p text:style-name="P3">или предложите другую (обсудим)</text:p>
        </text:list-item>
      </text:list>
      <text:p text:style-name="Text_20_body">Все графики должны инициализироваться через JS статичными данными.<text:line-break/>Нужны:</text:p>
      <text:list text:style-name="L3">
        <text:list-item>
          <text:p text:style-name="P4">line chart</text:p>
        </text:list-item>
        <text:list-item>
          <text:p text:style-name="P4">donut chart</text:p>
        </text:list-item>
        <text:list-item>
          <text:p text:style-name="P4">bar chart</text:p>
        </text:list-item>
        <text:list-item>
          <text:p text:style-name="P4">funnel/pyramid imitation</text:p>
        </text:list-item>
        <text:list-item>
          <text:p text:style-name="P4">progress bars</text:p>
        </text:list-item>
      </text:list>
      <text:p text:style-name="Text_20_body">Адаптив:</text:p>
      <text:list text:style-name="L4">
        <text:list-item>
          <text:p text:style-name="P5">Полная адаптация под мобильные устройства</text:p>
        </text:list-item>
        <text:list-item>
          <text:p text:style-name="P5">Sidebar:</text:p>
          <text:list>
            <text:list-item>
              <text:p text:style-name="P5"><text:soft-page-break/>desktop → полный</text:p>
            </text:list-item>
            <text:list-item>
              <text:p text:style-name="P5">tablet/mobile → сужается до иконок</text:p>
            </text:list-item>
            <text:list-item>
              <text:p text:style-name="P5">mobile → может скрываться через burger menu</text:p>
            </text:list-item>
          </text:list>
        </text:list-item>
        <text:list-item>
          <text:p text:style-name="P5">Таблицы:</text:p>
          <text:list>
            <text:list-item>
              <text:p text:style-name="P5">допускается горизонтальный скролл</text:p>
            </text:list-item>
            <text:list-item>
              <text:p text:style-name="P5">либо карточный responsive layout на усмотрение верстальщика</text:p>
            </text:list-item>
          </text:list>
        </text:list-item>
        <text:list-item>
          <text:p text:style-name="P5">Важно сохранить общий premium/SaaS визуал</text:p>
        </text:list-item>
      </text:list>
      <text:p text:style-name="Text_20_body">UI/UX:</text:p>
      <text:list text:style-name="L5">
        <text:list-item>
          <text:p text:style-name="P6">Внешний вид максимально близкий к макетам</text:p>
        </text:list-item>
        <text:list-item>
          <text:p text:style-name="P6">Светлый минималистичный SaaS стиль</text:p>
        </text:list-item>
        <text:list-item>
          <text:p text:style-name="P6">Скругления, тени, spacing, hover-эффекты сохранить</text:p>
        </text:list-item>
        <text:list-item>
          <text:p text:style-name="P6">Цветовая схема:</text:p>
          <text:list>
            <text:list-item>
              <text:p text:style-name="P6">фиолетовый primary</text:p>
            </text:list-item>
            <text:list-item>
              <text:p text:style-name="P6">зелёный success</text:p>
            </text:list-item>
            <text:list-item>
              <text:p text:style-name="P6">жёлтый warning</text:p>
            </text:list-item>
            <text:list-item>
              <text:p text:style-name="P6">красный danger</text:p>
            </text:list-item>
          </text:list>
        </text:list-item>
        <text:list-item>
          <text:p text:style-name="P6">Все состояния должны выглядеть “живыми”, а не как статичная картинка</text:p>
        </text:list-item>
      </text:list>
      <text:p text:style-name="Text_20_body">Dropdown / фильтры:<text:line-break/>Если список не показан в макете — всё равно реализовать dropdown с примерными данными.</text:p>
      <text:p text:style-name="Text_20_body">Примеры:<text:line-break/>Менеджеры:</text:p>
      <text:list text:style-name="L6">
        <text:list-item>
          <text:p text:style-name="P7">Иван Петров</text:p>
        </text:list-item>
        <text:list-item>
          <text:p text:style-name="P7">Мария Сидорова</text:p>
        </text:list-item>
        <text:list-item>
          <text:p text:style-name="P7">Алексей Кузнецов</text:p>
        </text:list-item>
        <text:list-item>
          <text:p text:style-name="P7">Екатерина Волкова</text:p>
        </text:list-item>
      </text:list>
      <text:p text:style-name="Text_20_body">Статусы:</text:p>
      <text:list text:style-name="L7">
        <text:list-item>
          <text:p text:style-name="P8">Создан</text:p>
        </text:list-item>
        <text:list-item>
          <text:p text:style-name="P8">Отправлен</text:p>
        </text:list-item>
        <text:list-item>
          <text:p text:style-name="P8">Использован</text:p>
        </text:list-item>
        <text:list-item>
          <text:p text:style-name="P8">Просрочен</text:p>
        </text:list-item>
      </text:list>
      <text:p text:style-name="Text_20_body">Риск:</text:p>
      <text:list text:style-name="L8">
        <text:list-item>
          <text:p text:style-name="P9">Низкий</text:p>
        </text:list-item>
        <text:list-item>
          <text:p text:style-name="P9"><text:soft-page-break/>Средний</text:p>
        </text:list-item>
        <text:list-item>
          <text:p text:style-name="P9">Критический</text:p>
        </text:list-item>
      </text:list>
      <text:p text:style-name="Text_20_body">Сегменты:</text:p>
      <text:list text:style-name="L9">
        <text:list-item>
          <text:p text:style-name="P10">VIP</text:p>
        </text:list-item>
        <text:list-item>
          <text:p text:style-name="P10">Retail</text:p>
        </text:list-item>
        <text:list-item>
          <text:p text:style-name="P10">B2B</text:p>
        </text:list-item>
        <text:list-item>
          <text:p text:style-name="P10">Новые клиенты</text:p>
        </text:list-item>
      </text:list>
      <text:p text:style-name="Text_20_body">Периоды:</text:p>
      <text:list text:style-name="L10">
        <text:list-item>
          <text:p text:style-name="P11">7 дней</text:p>
        </text:list-item>
        <text:list-item>
          <text:p text:style-name="P11">30 дней</text:p>
        </text:list-item>
        <text:list-item>
          <text:p text:style-name="P11">60 дней</text:p>
        </text:list-item>
        <text:list-item>
          <text:p text:style-name="P11">90 дней</text:p>
        </text:list-item>
      </text:list>
      <text:p text:style-name="Text_20_body">Иконки:</text:p>
      <text:list text:style-name="L11">
        <text:list-item>
          <text:p text:style-name="P12">SVG иконки</text:p>
        </text:list-item>
        <text:list-item>
          <text:p text:style-name="P12">Можно использовать:</text:p>
          <text:list>
            <text:list-item>
              <text:p text:style-name="P12">Font Awesome</text:p>
            </text:list-item>
            <text:list-item>
              <text:p text:style-name="P12">Lucide</text:p>
            </text:list-item>
            <text:list-item>
              <text:p text:style-name="P12">Heroicons</text:p>
            </text:list-item>
            <text:list-item>
              <text:p text:style-name="P12">Flaticon SVG</text:p>
            </text:list-item>
          </text:list>
        </text:list-item>
        <text:list-item>
          <text:p text:style-name="P12">Иконки должны быть максимально похожи на макет</text:p>
        </text:list-item>
        <text:list-item>
          <text:p text:style-name="P12">Цвета и стиль иконок должны совпадать с дизайном</text:p>
        </text:list-item>
        <text:list-item>
          <text:p text:style-name="P12">Emoji НЕ использовать</text:p>
        </text:list-item>
      </text:list>
      <text:p text:style-name="Text_20_body">Что должно быть реализовано:</text:p>
      <text:list text:style-name="L12">
        <text:list-item>
          <text:p text:style-name="P13">Sidebar navigation</text:p>
        </text:list-item>
        <text:list-item>
          <text:p text:style-name="P13">Header/topbar</text:p>
        </text:list-item>
        <text:list-item>
          <text:p text:style-name="P13">KPI карточки</text:p>
        </text:list-item>
        <text:list-item>
          <text:p text:style-name="P13">Таблицы</text:p>
        </text:list-item>
        <text:list-item>
          <text:p text:style-name="P13">Фильтры</text:p>
        </text:list-item>
        <text:list-item>
          <text:p text:style-name="P13">Dropdown</text:p>
        </text:list-item>
        <text:list-item>
          <text:p text:style-name="P13">Search input</text:p>
        </text:list-item>
        <text:list-item>
          <text:p text:style-name="P13">Charts</text:p>
        </text:list-item>
        <text:list-item>
          <text:p text:style-name="P13">Progress bars</text:p>
        </text:list-item>
        <text:list-item>
          <text:p text:style-name="P13"><text:soft-page-break/>Badges/status labels</text:p>
        </text:list-item>
        <text:list-item>
          <text:p text:style-name="P13">Action buttons</text:p>
        </text:list-item>
        <text:list-item>
          <text:p text:style-name="P13">Tooltip/help icons</text:p>
        </text:list-item>
        <text:list-item>
          <text:p text:style-name="P13">Pagination</text:p>
        </text:list-item>
        <text:list-item>
          <text:p text:style-name="P13">Responsive behavior</text:p>
        </text:list-item>
        <text:list-item>
          <text:p text:style-name="P13">Hover animations</text:p>
        </text:list-item>
        <text:list-item>
          <text:p text:style-name="P13">Empty/loading state (минимально)</text:p>
        </text:list-item>
        <text:list-item>
          <text:p text:style-name="P13">Sticky header/sidebar — по возможности</text:p>
        </text:list-item>
      </text:list>
      <text:p text:style-name="Text_20_body">Технически:</text:p>
      <text:list text:style-name="L13">
        <text:list-item>
          <text:p text:style-name="P14">Чистая структура проекта</text:p>
        </text:list-item>
        <text:list-item>
          <text:p text:style-name="P14">Разделение CSS/JS</text:p>
        </text:list-item>
        <text:list-item>
          <text:p text:style-name="P14">Нормальные классы и читаемый код</text:p>
        </text:list-item>
        <text:list-item>
          <text:p text:style-name="P14">Без inline-стилей</text:p>
        </text:list-item>
        <text:list-item>
          <text:p text:style-name="P14">Без тяжёлых UI framework (Bootstrap не использовать)</text:p>
        </text:list-item>
        <text:list-item>
          <text:p text:style-name="P14">Допускается:</text:p>
          <text:list>
            <text:list-item>
              <text:p text:style-name="P14">SCSS</text:p>
            </text:list-item>
            <text:list-item>
              <text:p text:style-name="P14">CSS variables</text:p>
            </text:list-item>
            <text:list-item>
              <text:p text:style-name="P14">BEM-like naming</text:p>
            </text:list-item>
          </text:list>
        </text:list-item>
      </text:list>
      <text:p text:style-name="Text_20_body">Важно:<text:line-break/>Нужна не “демо-картинка”, а почти готовый frontend-шаблон продукта.<text:line-break/>После вёрстки должно остаться:</text:p>
      <text:list text:style-name="L14">
        <text:list-item>
          <text:p text:style-name="P15">подключить backend</text:p>
        </text:list-item>
        <text:list-item>
          <text:p text:style-name="P15">заменить mock data на API</text:p>
        </text:list-item>
      </text:list>
      <text:p text:style-name="Text_20_body">Но НЕ переделывать дизайн/UI.</text:p>
      <text:p text:style-name="P16"><text:line-break/><text:span text:style-name="T1">Базовый масштаб макетов 1158</text:span><text:span text:style-name="T2">px</text:span></text:p>
      <text:p text:style-name="Standard"><draw:frame draw:style-name="fr1" draw:name="Изображение1" text:anchor-type="char" svg:width="17cm" svg:height="4.48cm" draw:z-index="0"><draw:image xlink:href="Pictures/100000000000058700000175BD5FF6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23:35:42.983251100</meta:creation-date>
    <dc:date>2026-05-14T09:26:48.019674800</dc:date>
    <meta:editing-duration>PT2M54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4" meta:paragraph-count="113" meta:word-count="434" meta:character-count="2645" meta:non-whitespace-character-count="2415"/>
  </office:meta>
</office:document-meta>
</file>